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Display" svg:font-family="'Aptos Display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BO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Display" svg:font-family="'Aptos Display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DejaVu Sans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8">00/00/0000</text:date>, <text:time style:data-style-name="N2" text:time-value="14:49:46.8397722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jay </meta:initial-creator>
    <meta:creation-date>2010-05-26T15:16:03</meta:creation-date>
    <meta:generator>LibreOffice/26.2.4.2$Linux_X86_64 LibreOffice_project/64a984c51f4702dbd3710b13428c673a2f1292e7</meta:generator>
    <dc:date>2026-07-18T15:42:48.447374411</dc:date>
    <meta:editing-duration>PT42M11S</meta:editing-duration>
    <meta:editing-cycles>1</meta:editing-cycles>
    <meta:document-statistic meta:table-count="3" meta:cell-count="1" meta:object-count="0"/>
  </office:meta>
</office:document-meta>
</file>